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75cm" fo:min-width="24.5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4.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4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1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1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1.976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cm" loext:decorative="false"/>
    </style:style>
    <style:style style:name="gr11" style:family="graphic" style:parent-style-name="standard">
      <style:graphic-properties draw:textarea-vertical-align="middle" draw:auto-grow-height="false" fo:min-height="0.749cm" fo:min-width="0.99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1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1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79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29cm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6.031cm" loext:decorative="false"/>
      <style:paragraph-properties style:writing-mode="lr-tb"/>
    </style:style>
    <style:style style:name="pr1" style:family="presentation" style:parent-style-name="기본값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기본값-title">
      <style:graphic-properties fo:min-height="2.629cm" loext:decorative="false"/>
      <style:paragraph-properties style:writing-mode="lr-tb"/>
    </style:style>
    <style:style style:name="pr3" style:family="presentation" style:parent-style-name="기본값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908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1.48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25cm" svg:height="1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5.5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5cm" svg:height="6cm" svg:x="1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3.5cm" svg:height="4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3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cm" svg:height="1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9cm" svg:height="0.999cm" svg:x="5.501cm" svg:y="3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5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4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19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4cm" svg:x="21cm" svg:y="3.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5cm" svg:height="2.042cm" svg:x="12.7cm" svg:y="4.8cm">
          <draw:text-box>
            <text:p><text:span text:style-name="T1">0</text:span></text:p>
            <text:p><text:span text:style-name="T2"/></text:p>
          </draw:text-box>
        </draw:frame>
        <draw:frame draw:style-name="gr16" draw:text-style-name="P4" draw:layer="layout" svg:width="1cm" svg:height="1cm" svg:x="12.8cm" svg:y="6.5cm">
          <draw:text-box>
            <text:p>+</text:p>
          </draw:text-box>
        </draw:frame>
        <draw:frame draw:style-name="gr16" draw:text-style-name="P4" draw:layer="layout" svg:width="1cm" svg:height="1cm" svg:x="15.3cm" svg:y="6.5cm">
          <draw:text-box>
            <text:p>+</text:p>
          </draw:text-box>
        </draw:frame>
        <draw:frame draw:style-name="gr16" draw:text-style-name="P4" draw:layer="layout" svg:width="1cm" svg:height="1cm" svg:x="19.3cm" svg:y="6.5cm">
          <draw:text-box>
            <text:p>+</text:p>
          </draw:text-box>
        </draw:frame>
        <draw:frame draw:style-name="gr16" draw:text-style-name="P4" draw:layer="layout" svg:width="1cm" svg:height="1cm" svg:x="21.3cm" svg:y="6.5cm">
          <draw:text-box>
            <text:p>+</text:p>
          </draw:text-box>
        </draw:frame>
        <draw:frame draw:style-name="gr16" draw:text-style-name="P4" draw:layer="layout" svg:width="1cm" svg:height="1cm" svg:x="12.8cm" svg:y="3.4cm">
          <draw:text-box>
            <text:p>-</text:p>
          </draw:text-box>
        </draw:frame>
        <draw:frame draw:style-name="gr17" draw:text-style-name="P4" draw:layer="layout" svg:width="1.7cm" svg:height="3.179cm" svg:x="15.1cm" svg:y="3cm">
          <draw:text-box>
            <text:p>-</text:p>
            <text:p>Inv</text:p>
          </draw:text-box>
        </draw:frame>
        <draw:frame draw:style-name="gr16" draw:text-style-name="P4" draw:layer="layout" svg:width="1cm" svg:height="1cm" svg:x="19.3cm" svg:y="3.5cm">
          <draw:text-box>
            <text:p>-</text:p>
          </draw:text-box>
        </draw:frame>
        <draw:frame draw:style-name="gr16" draw:text-style-name="P4" draw:layer="layout" svg:width="1cm" svg:height="1cm" svg:x="21.5cm" svg:y="3.5cm">
          <draw:text-box>
            <text:p>-</text:p>
          </draw:text-box>
        </draw:frame>
        <draw:frame draw:style-name="gr18" draw:text-style-name="P4" draw:layer="layout" svg:width="1cm" svg:height="1.179cm" svg:x="15.3cm" svg:y="5cm">
          <draw:text-box>
            <text:p>1</text:p>
          </draw:text-box>
        </draw:frame>
        <draw:frame draw:style-name="gr18" draw:text-style-name="P4" draw:layer="layout" svg:width="1cm" svg:height="1.179cm" svg:x="19.3cm" svg:y="4.921cm">
          <draw:text-box>
            <text:p>2</text:p>
          </draw:text-box>
        </draw:frame>
        <draw:frame draw:style-name="gr18" draw:text-style-name="P4" draw:layer="layout" svg:width="1cm" svg:height="1.179cm" svg:x="21.3cm" svg:y="5cm">
          <draw:text-box>
            <text:p>3</text:p>
          </draw:text-box>
        </draw:frame>
        <draw:frame draw:style-name="gr18" draw:text-style-name="P4" draw:layer="layout" svg:width="1cm" svg:height="1.179cm" svg:x="24.3cm" svg:y="3.321cm">
          <draw:text-box>
            <text:p>5</text:p>
          </draw:text-box>
        </draw:frame>
        <draw:frame draw:style-name="gr18" draw:text-style-name="P4" draw:layer="layout" svg:width="1cm" svg:height="1.179cm" svg:x="24.5cm" svg:y="6.5cm">
          <draw:text-box>
            <text:p>6</text:p>
          </draw:text-box>
        </draw:frame>
        <draw:line draw:style-name="gr19" draw:text-style-name="P1" draw:layer="layout" svg:x1="2.5cm" svg:y1="12cm" svg:x2="16cm" svg:y2="12cm">
          <text:p/>
        </draw:line>
        <draw:line draw:style-name="gr19" draw:text-style-name="P1" draw:layer="layout" svg:x1="9.5cm" svg:y1="10cm" svg:x2="9.5cm" svg:y2="14cm">
          <text:p/>
        </draw:lin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0.5cm">
          <draw:text-box>
            <text:p>14 - 20</text:p>
          </draw:text-box>
        </draw:frame>
        <draw:frame draw:style-name="gr16" draw:text-style-name="P4" draw:layer="layout" svg:width="3.5cm" svg:height="1cm" svg:x="4.5cm" svg:y="12.5cm">
          <draw:text-box>
            <text:p>21 - 27</text:p>
          </draw:text-box>
        </draw:frame>
        <draw:frame draw:style-name="gr16" draw:text-style-name="P4" draw:layer="layout" svg:width="3.5cm" svg:height="1cm" svg:x="4.6cm" svg:y="10.5cm">
          <draw:text-box>
            <text:p>7 - 13</text:p>
          </draw:text-box>
        </draw:frame>
        <draw:frame draw:style-name="gr16" draw:text-style-name="P4" draw:layer="layout" svg:width="3.5cm" svg:height="1cm" svg:x="11.5cm" svg:y="12.5cm">
          <draw:text-box>
            <text:p>28 - 34</text:p>
          </draw:text-box>
        </draw:frame>
        <draw:frame draw:style-name="gr16" draw:text-style-name="P4" draw:layer="layout" svg:width="1.5cm" svg:height="1cm" svg:x="18.9cm" svg:y="10.5cm">
          <draw:text-box>
            <text:p>35</text:p>
          </draw:text-box>
        </draw:frame>
        <draw:frame draw:style-name="gr16" draw:text-style-name="P4" draw:layer="layout" svg:width="1.5cm" svg:height="1cm" svg:x="19cm" svg:y="12.5cm">
          <draw:text-box>
            <text:p>36</text:p>
          </draw:text-box>
        </draw:frame>
        <draw:frame draw:style-name="gr16" draw:text-style-name="P4" draw:layer="layout" svg:width="1.5cm" svg:height="1cm" svg:x="23cm" svg:y="10cm">
          <draw:text-box>
            <text:p>37</text:p>
          </draw:text-box>
        </draw:frame>
        <draw:frame draw:style-name="gr16" draw:text-style-name="P4" draw:layer="layout" svg:width="1.5cm" svg:height="1cm" svg:x="22cm" svg:y="11cm">
          <draw:text-box>
            <text:p>38</text:p>
          </draw:text-box>
        </draw:frame>
        <draw:frame draw:style-name="gr16" draw:text-style-name="P4" draw:layer="layout" svg:width="1.5cm" svg:height="1cm" svg:x="23cm" svg:y="12cm">
          <draw:text-box>
            <text:p>39</text:p>
          </draw:text-box>
        </draw:frame>
        <draw:frame draw:style-name="gr16" draw:text-style-name="P4" draw:layer="layout" svg:width="1.5cm" svg:height="1cm" svg:x="24.2cm" svg:y="11cm">
          <draw:text-box>
            <text:p>40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3cm" svg:y="4.5cm">
          <draw:text-box>
            <text:p>42</text:p>
          </draw:text-box>
        </draw:frame>
        <draw:frame draw:style-name="gr16" draw:text-style-name="P4" draw:layer="layout" svg:width="1.5cm" svg:height="1cm" svg:x="5.701cm" svg:y="2.5cm">
          <draw:text-box>
            <text:p>43</text:p>
          </draw:text-box>
        </draw:frame>
        <draw:frame draw:style-name="gr16" draw:text-style-name="P4" draw:layer="layout" svg:width="1.5cm" svg:height="1cm" svg:x="3cm" svg:y="2.5cm">
          <draw:text-box>
            <text:p>41</text:p>
          </draw:text-box>
        </draw:frame>
        <draw:frame draw:style-name="gr16" draw:text-style-name="P4" draw:layer="layout" svg:width="1.5cm" svg:height="1cm" svg:x="5.5cm" svg:y="4.5cm">
          <draw:text-box>
            <text:p>44</text:p>
          </draw:text-box>
        </draw:frame>
        <draw:line draw:style-name="gr19" draw:text-style-name="P1" draw:layer="layout" svg:x1="3cm" svg:y1="4cm" svg:x2="4.5cm" svg:y2="4cm">
          <text:p/>
        </draw:line>
        <draw:line draw:style-name="gr19" draw:text-style-name="P1" draw:layer="layout" svg:x1="5.501cm" svg:y1="4cm" svg:x2="7cm" svg:y2="4cm">
          <text:p/>
        </draw:line>
        <draw:frame draw:style-name="gr16" draw:text-style-name="P4" draw:layer="layout" svg:width="1.5cm" svg:height="1cm" svg:x="3.1cm" svg:y="5.8cm">
          <draw:text-box>
            <text:p>45</text:p>
          </draw:text-box>
        </draw:frame>
        <draw:frame draw:style-name="gr16" draw:text-style-name="P4" draw:layer="layout" svg:width="1.5cm" svg:height="1cm" svg:x="5.6cm" svg:y="5.7cm">
          <draw:text-box>
            <text:p>46</text:p>
          </draw:text-box>
        </draw:frame>
        <draw:frame draw:style-name="gr16" draw:text-style-name="P4" draw:layer="layout" svg:width="1.5cm" svg:height="1cm" svg:x="3.2cm" svg:y="7.7cm">
          <draw:text-box>
            <text:p>47</text:p>
          </draw:text-box>
        </draw:frame>
        <draw:frame draw:style-name="gr16" draw:text-style-name="P4" draw:layer="layout" svg:width="1.5cm" svg:height="1cm" svg:x="5.7cm" svg:y="7.7cm">
          <draw:text-box>
            <text:p>48</text:p>
          </draw:text-box>
        </draw:frame>
        <draw:frame draw:style-name="gr16" draw:text-style-name="P4" draw:layer="layout" svg:width="1.5cm" svg:height="1cm" svg:x="9.1cm" svg:y="3cm">
          <draw:text-box>
            <text:p>49</text:p>
          </draw:text-box>
        </draw:frame>
        <draw:frame draw:style-name="gr16" draw:text-style-name="P4" draw:layer="layout" svg:width="1.5cm" svg:height="1cm" svg:x="9cm" svg:y="5.5cm">
          <draw:text-box>
            <text:p>50</text:p>
          </draw:text-box>
        </draw:frame>
        <draw:frame draw:style-name="gr20" draw:text-style-name="P5" draw:layer="layout" svg:width="11cm" svg:height="2.539cm" svg:x="8cm" svg:y="8.005cm">
          <draw:text-box>
            <text:p><text:span text:style-name="T3">* Axle: Up – Dec, Down – Inc. Most of the axles should be inverted.</text:span></text:p>
            <text:p><text:span text:style-name="T3">* Throttle: Non-inverted, Dynamic: Inverted.</text:span></text:p>
          </draw:text-box>
        </draw:frame>
        <draw:frame draw:style-name="gr21" draw:text-style-name="P4" draw:layer="layout" svg:width="3cm" svg:height="2cm" svg:x="23cm" svg:y="4.5cm">
          <draw:text-box>
            <text:p>4</text:p>
            <text:p>Bail Off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rmany</text:p>
          </draw:text-box>
        </draw:frame>
        <draw:frame draw:style-name="gr23" draw:layer="layout" svg:width="24.499cm" svg:height="4.772cm" svg:x="2.123cm" svg:y="4.0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3: Direct Brake</text:span></text:p>
                <text:p text:style-name="P7"><text:span text:style-name="T4">(IndependentBrake)</text:span></text:p>
              </table:table-cell>
              <table:table-cell>
                <text:p text:style-name="P7"><text:span text:style-name="T4">6: Headlight Brightness</text:span></text:p>
                <text:p text:style-name="P7"><text:span text:style-name="T4">(Headlights)</text:span></text:p>
              </table:table-cell>
              <table:table-cell>
                <text:p text:style-name="P7"><text:span text:style-name="T4">35/36: AFB Speed</text:span></text:p>
                <text:p text:style-name="P7"><text:span text:style-name="T4">(CruiseControlAdjust)</text:span></text:p>
              </table:table-cell>
              <table:table-cell>
                <text:p text:style-name="P7"><text:span text:style-name="T4">37/39: Door Open/Close</text:span></text:p>
                <text:p text:style-name="P7"><text:span text:style-name="T4">Open: +(37), Close: -(39)</text:span></text:p>
              </table:table-cell>
              <table:table-cell>
                <text:p text:style-name="P7"><text:span text:style-name="T4">38/40: Door Selector</text:span></text:p>
                <text:p text:style-name="P7"><text:span text:style-name="T4">Left: +, Right: -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42: PZB Ack</text:span></text:p>
                <text:p text:style-name="P8"><text:span text:style-name="T4">(PZB_Acknowledge)</text:span></text:p>
              </table:table-cell>
              <table:table-cell>
                <text:p text:style-name="P7"><text:span text:style-name="T4">43: PZB Override</text:span></text:p>
                <text:p text:style-name="P7"><text:span text:style-name="T4">(PZB_Override)</text:span></text:p>
              </table:table-cell>
              <table:table-cell>
                <text:p text:style-name="P7"><text:span text:style-name="T4">44: PZB Release</text:span></text:p>
                <text:p text:style-name="P7"><text:span text:style-name="T4">(PZB_Release)</text:span></text:p>
              </table:table-cell>
              <table:table-cell>
                <text:p text:style-name="P7"><text:span text:style-name="T4">45: Sifa Reset (Alerter)</text:span></text:p>
              </table:table-cell>
              <table:table-cell>
                <text:p text:style-name="P7"><text:span text:style-name="T4">46: Sand (Sand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47: Contact Signaller</text:span></text:p>
                <text:p text:style-name="P9"><text:span text:style-name="T5">($ContactSignaller, $ContactSignaller_B, </text:span><text:span text:style-name="T4">$ContactSignaller_F)</text:span></text:p>
              </table:table-cell>
              <table:table-cell>
                <text:p text:style-name="P7"><text:span text:style-name="T4">48: Brake Release</text:span></text:p>
                <text:p text:style-name="P7"><text:span text:style-name="T4">(BrakeRelease)</text:span></text:p>
              </table:table-cell>
              <table:table-cell/>
              <table:table-cell/>
              <table:table-cell>
                <text:p text:style-name="P7"><text:span text:style-name="T4">If loco has speed selector and force selector, 1: force selector, 35/36: speed selec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1" draw:layer="layout" svg:width="24.5cm" svg:height="6.281cm" svg:x="1cm" svg:y="9.25cm">
          <draw:text-box>
            <text:p><text:span text:style-name="T4">* AFB: CruiseControl</text:span></text:p>
            <text:p><text:span text:style-name="T4">* Train Line: $TrainLine_B, $TrainLine_F, $TrainHeating (Train Power) / CoachLighting, $PassengerLights (Pass. Light)</text:span></text:p>
            <text:p text:style-name="P10"><text:span text:style-name="T5">* Headlight Selector: HeadlightsBack, </text:span><text:span text:style-name="T4">$SignalLights_F, $SignalLights_B</text:span></text:p>
            <text:p><text:span text:style-name="T4">* Master Instrument Light: GaugeLights</text:span></text:p>
            <text:p><text:span text:style-name="T4">* Parking Brake: Handbrake</text:span></text:p>
            <text:p><text:span text:style-name="T4">* MCB: CircuitBreaker</text:span></text:p>
            <text:p text:style-name="P10"><text:span text:style-name="T5">* DoorSelector: $PassengerDoorsSideSelector / $PassengerDoorSelector_B / $PassengerDoorSelector_F / $PassengerDoorSelector / $DoorsSideSelectionSwitch_B / $DoorsSideSelectionSwitch_F</text:span></text:p>
            <text:p text:style-name="P10"><text:span text:style-name="T5">* Door Open/Close: $OpenClosePassengerDoors_M / $OpenClosePassengerDoors_L / </text:span><text:span text:style-name="T4">$OpenClosePassengerDoors_R / $PassengerDoors_BR / $PassengerDoors_FR</text:span></text:p>
            <text:p text:style-name="P10"><text:span text:style-name="T4">* Brake Key: BrakeKey / $BrakeKey_B / $BrakeKey_F / $DriversBrakeCutOut_B / $DriversBrakeCutOut_F</text:span></text:p>
            <text:p text:style-name="P10"><text:span text:style-name="T4">* Brake Overcharge: BrakeCharge / $BrakeOvercharge_F / $BrakeOvercharge_B</text:span></text:p>
            <text:p text:style-name="P10"><text:span text:style-name="T4">* Desk Light: CabLightsAlt</text:span></text:p>
            <text:p text:style-name="P10"><text:span text:style-name="T4">* Speed Selector: $SpeedSelector_F / $SpeedSelector_B, * Force Selector: $ForceSelector_B / $ForceSelector_F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Other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CD 750: TTC_NJT_BiLevels</text:span></text:p>
              </text:list-item>
              <text:list-item>
                <text:p><text:span text:style-name="T3">CD 843: TTC_SD40-2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2" draw:layer="layout" svg:width="25.199cm" svg:height="2.629cm" svg:x="1.4cm" svg:y="0.628cm" presentation:class="title">
          <draw:text-box>
            <text:p>General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Pause: #PauseMenu</text:span></text:p>
              </text:list-item>
              <text:list-item>
                <text:p><text:span text:style-name="T6">Reverser Handle: MasterSwitch</text:span></text:p>
              </text:list-item>
              <text:list-item>
                <text:p><text:span text:style-name="T6">1-Person Camera: #Camera_Vehicle</text:span></text:p>
              </text:list-item>
              <text:list-item>
                <text:p><text:span text:style-name="T6">Exterior Camera: #Camera_ExteriorToggle</text:span></text:p>
              </text:list-item>
              <text:list-item>
                <text:p><text:span text:style-name="T6">Next Cab: #Camera_NextDriverInterior</text:span></text:p>
              </text:list-item>
              <text:list-item>
                <text:p><text:span text:style-name="T6">Prev Cab: #Camera_PreviousDriverInterior</text:span></text:p>
              </text:list-item>
              <text:list-item>
                <text:p><text:span text:style-name="T6">HUD: #HUDVisibility</text:span></text:p>
              </text:list-item>
              <text:list-item>
                <text:p><text:span text:style-name="T6">Schedule: #ToggleSchedule</text:span></text:p>
              </text:list-item>
              <text:list-item>
                <text:p><text:span text:style-name="T6">Door: #GamepadToggleDoorsLeft, #GamepadToggleDoorsRight (Sometimes 38 and 40 swapped)</text:span>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cm" svg:stroke-color="#000000" draw:marker-start-width="0.5cm" draw:marker-start-center="false" draw:marker-end-width="0.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23:16:25.286789100</meta:creation-date>
    <dc:date>2026-05-06T23:48:48.427852300</dc:date>
    <meta:editing-duration>PT13H25M37S</meta:editing-duration>
    <meta:editing-cycles>39</meta:editing-cycles>
    <meta:generator>LibreOffice/26.2.1.2$Windows_X86_64 LibreOffice_project/620$Build-2</meta:generator>
    <meta:document-statistic meta:object-count="102"/>
  </office:meta>
</office:document-meta>
</file>